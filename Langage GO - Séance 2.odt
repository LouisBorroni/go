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Langage GO<text:s/>Séance 2</text:h>
      <text:p text:style-name="Normal"/>
      <text:p text:style-name="Normal">Combien a coûter le bug d’arianne 5 : 500 millions</text:p>
      <text:p text:style-name="Normal"/>
      <text:p text:style-name="Normal">Que ’est-ce que c’est qu’un slice <text:s/>= c’est un tableau dont la taille est modifiable<text:s/></text:p>
      <text:p text:style-name="Normal"/>
      <text:p text:style-name="Normal">3 facons de déclarer une variable =<text:s/><text:span text:style-name="T2">var</text:span><text:s/><text:span text:style-name="T3">nom</text:span><text:s/>variable<text:s/><text:span text:style-name="T4">type</text:span><text:s/>et<text:s/><text:span text:style-name="T5">valeur</text:span><text:span text:style-name="T6">, </text:span><text:span text:style-name="T7">:=</text:span><text:span text:style-name="T8"><text:s/></text:span>uniquement dans les fonctions, on peut également déclarer 2 variables en même temps :<text:s/><text:span text:style-name="T9">x, y := 10,20<text:s/></text:span></text:p>
      <text:p text:style-name="Normal"/>
      <text:p text:style-name="Normal">On peut également avoir ce cas de figure avec l’échange de valeurs :<text:line-break/><text:span text:style-name="T10">x, y = y, x<text:s/></text:span><text:s/>pas besoin <text:s/>de variables temporaires</text:p>
      <text:p text:style-name="Normal"/>
      <text:p text:style-name="Normal">Constantes :<text:s/></text:p>
      <text:p text:style-name="Normal">Const nom valeur, on peut aussi typer</text:p>
      <text:p text:style-name="Normal"/>
      <text:p text:style-name="Normal">Iota générateur d’énumération<text:s/></text:p>
      <text:p text:style-name="Normal"/>
      <text:p text:style-name="Normal">Retour multiple est très apprécié en go (valeur erreur)</text:p>
      <text:p text:style-name="Normal"/>
      <text:p text:style-name="Normal">Qu’est-ce qu’une fonction variadique : une fonction qui peut prendre un nombre d’arguments pas définit.</text:p>
      <text:p text:style-name="Normal"/>
      <text:p text:style-name="Normal">Closure en go = c’est une fonction qui retourne on fonction<text:s/><text:tab/>utilisé pour tout ce qui est http/tri/callbacks</text:p>
      <text:p text:style-name="Normal"/>
      <text:p text:style-name="Normal">For est la seule vraie boucle en go</text:p>
      <text:p text:style-name="Normal"/>
      <text:p text:style-name="Normal">On a aussi une composante switch case</text:p>
      <text:p text:style-name="Normal"/>
      <text:p text:style-name="Normal">Falltrought force l’execution du case dans le switch même si la condition ne correspond pas</text:p>
      <text:p text:style-name="Normal"/>
      <text:p text:style-name="Normal">Map = côté clé valeur autrement dit dictionnaire<text:line-break/></text:p>
      <text:p text:style-name="Normal">notion de copy des slices<text:s/>= en go on peut pas copier avec = <text:s/>il faut utiliser copy pour faire une vraie copy indépendante</text:p>
      <text:p text:style-name="Normal"/>
      <text:p text:style-name="Normal">optimisation d’usage de pointeurs</text:p>
      <text:p text:style-name="Normal"/>
      <text:p text:style-name="Normal">la sémantique est très importante<text:s/></text:p>
      <text:p text:style-name="Normal"/>
      <text:p text:style-name="Normal">quand ça commence par une maj = accessible de partout</text:p>
      <text:p text:style-name="Normal"/>
      <text:p text:style-name="Normal">mais quand ça commence par une minuscule non exportée<text:s/></text:p>
      <text:p text:style-name="Normal"/>
      <text:p text:style-name="Normal">camelCase debute avec une minuscule / privée</text:p>
      <text:p text:style-name="Normal">et PascalCase par une maj donc exportée / partagée<text:s/></text:p>
      <text:soft-page-break/>
      <text:p text:style-name="Normal">defer – permet de garantir l’execution d’une fonction</text:p>
      <text:p text:style-name="Normal"/>
      <text:p text:style-name="Normal">fmt nous contraint, mais on a exactement la même façon de formater le code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Yu Gothic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Yu Gothic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/>
      <style:text-properties style:font-name-asian="Yu Gothic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Yu Gothic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uis Borroni</meta:initial-creator>
    <dc:creator>Louis Borroni</dc:creator>
    <meta:creation-date>2026-05-29T06:09:00Z</meta:creation-date>
    <dc:date>2026-05-29T15:04:00Z</dc:date>
    <meta:template xlink:href="Normal" xlink:type="simple"/>
    <meta:editing-cycles>5</meta:editing-cycles>
    <meta:editing-duration>PT32160S</meta:editing-duration>
    <meta:document-statistic meta:page-count="2" meta:paragraph-count="3" meta:word-count="241" meta:character-count="1564" meta:row-count="11" meta:non-whitespace-character-count="1326"/>
  </office:meta>
</office:document-meta>
</file>